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 Black" fo:font-size="14pt" fo:font-weight="bold" officeooo:rsid="000eba96" officeooo:paragraph-rsid="000eba96" style:font-size-asian="14pt" style:font-weight-asian="bold" style:font-size-complex="14pt" style:font-weight-complex="bold"/>
    </style:style>
    <style:style style:name="P2" style:family="paragraph" style:parent-style-name="Text_20_body">
      <style:text-properties officeooo:rsid="000eba96"/>
    </style:style>
    <style:style style:name="P3" style:family="paragraph" style:parent-style-name="Text_20_body">
      <style:text-properties officeooo:rsid="000eba96" officeooo:paragraph-rsid="000eba96"/>
    </style:style>
    <style:style style:name="P4" style:family="paragraph" style:parent-style-name="Text_20_body">
      <style:text-properties officeooo:paragraph-rsid="000eba96"/>
    </style:style>
    <style:style style:name="P5" style:family="paragraph" style:parent-style-name="Text_20_body">
      <style:text-properties fo:font-size="12pt" fo:font-style="normal" style:text-underline-style="none" fo:font-weight="normal" officeooo:paragraph-rsid="000eba9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size="14pt" fo:font-style="normal" style:text-underline-style="solid" style:text-underline-width="auto" style:text-underline-color="font-color" fo:font-weight="bold" officeooo:rsid="000eba96" officeooo:paragraph-rsid="000eba96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fo:font-size="14pt" style:text-underline-style="solid" style:text-underline-width="auto" style:text-underline-color="font-color" fo:font-weight="bold" officeooo:paragraph-rsid="000eba96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style:text-underline-style="none" fo:font-weight="normal" officeooo:rsid="000eba96" officeooo:paragraph-rsid="000eba96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4pt" style:text-underline-style="solid" style:text-underline-width="auto" style:text-underline-color="font-color" fo:font-weight="bold" officeooo:rsid="000eba96" officeooo:paragraph-rsid="000eba96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2pt" style:text-underline-style="none" fo:font-weight="normal" officeooo:rsid="000eba96" officeooo:paragraph-rsid="000eba96" style:font-size-asian="10.5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officeooo:rsid="000eba96"/>
    </style:style>
    <style:style style:name="T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E BASE DE DATOS II<text:line-break/>SANTIAGO GUADAGNINI</text:p>
      <text:p text:style-name="P2"><text:span text:style-name="Strong_20_Emphasis"><text:span text:style-name="T1">1)</text:span></text:span></text:p>
      <text:p text:style-name="P3">ALTER TABLE clientes</text:p>
      <text:p text:style-name="P3">ADD COLUMN teléfono VARCHAR(20);</text:p>
      <text:p text:style-name="P3"/>
      <text:p text:style-name="P3">UPDATE clientes</text:p>
      <text:p text:style-name="P3">SET teléfono = '+54 341400001'</text:p>
      <text:p text:style-name="P4"><text:span text:style-name="T2">WHERE id_cliente = 1;<text:line-break/><text:line-break/></text:span><text:span text:style-name="T3">Otra alternativa: <text:line-break/><text:line-break/></text:span><text:span text:style-name="T4">UPDATE clientes</text:span></text:p>
      <text:p text:style-name="P5">SET teléfono = '+54 341400001'</text:p>
      <text:p text:style-name="P5">WHERE nombre = 'Ana'</text:p>
      <text:p text:style-name="P5"><text:tab/>AND apellido = 'Garcia';</text:p>
      <text:p text:style-name="P5"/>
      <text:p text:style-name="P6">2)</text:p>
      <text:p text:style-name="P4">SELECT </text:p>
      <text:p text:style-name="P4">p.id_pedido, </text:p>
      <text:p text:style-name="P4"><text:tab/>c.nombre AS nombre_cliente, </text:p>
      <text:p text:style-name="P4"><text:tab/>c.ciudad AS ciudad_cliente, </text:p>
      <text:p text:style-name="P4"><text:tab/>p.fecha, </text:p>
      <text:p text:style-name="P4"><text:tab/>p.estado, </text:p>
      <text:p text:style-name="P4"><text:s/><text:tab/>SUM(dp.cantidad * dp.precio_unitario) AS total_pedido </text:p>
      <text:p text:style-name="P4">FROM pedidos p</text:p>
      <text:p text:style-name="P4">JOIN clientes c ON c.id_cliente = p.id_cliente </text:p>
      <text:p text:style-name="P4">JOIN detalles_pedido dp ON p.id_pedido = dp.id_pedido </text:p>
      <text:p text:style-name="P4">ORDER BY total_pedido ASC;</text:p>
      <text:p text:style-name="P4"/>
      <text:p text:style-name="P7"/>
      <text:p text:style-name="P7"/>
      <text:p text:style-name="P7"><text:soft-page-break/></text:p>
      <text:p text:style-name="P7">3) </text:p>
      <text:p text:style-name="Text_20_body"><text:span text:style-name="T5">1ra forma (LEFT JOIN) </text:span></text:p>
      <text:p text:style-name="Text_20_body">SELECT<text:line-break/><text:tab/>p.id_producto,<text:line-break/><text:tab/>p.nombre AS producto<text:line-break/>FROM productos p<text:line-break/>LEFT JOIN detalles_pedido dp<text:line-break/><text:tab/>ON p.id_producto = dp.id_producto<text:line-break/>WHERE dp.id_producto IS NULL; </text:p>
      <text:p text:style-name="Text_20_body"/>
      <text:p text:style-name="P8">2da forma (NOT IN)</text:p>
      <text:p text:style-name="P9">SELECT<text:line-break/><text:tab/>p.id_producto,<text:line-break/><text:tab/>p.nombre AS producto<text:line-break/>FROM productos p<text:line-break/>WHERE p.id_producto NOT IN (<text:line-break/><text:tab/>SELECT id_producto<text:line-break/><text:tab/>FROM detalles_pedido<text:line-break/>); </text:p>
      <text:p text:style-name="P10"/>
      <text:p text:style-name="P11">4) </text:p>
      <text:p text:style-name="P12">CREATE VIEW resumen_clientes AS<text:line-break/>SELECT<text:line-break/><text:tab/>c.nombre,<text:line-break/><text:tab/>c.ciudad,<text:line-break/><text:tab/>COUNT(DISTINCT p.id_pedido) AS total_pedidos,<text:line-break/><text:tab/>IFNULL(SUM(dp.cantidad * dp.precio_unitario), 0) AS monto_total<text:line-break/>FROM clientes c<text:line-break/>LEFT JOIN pedidos p<text:line-break/><text:tab/>ON c.id_cliente = p.id_cliente<text:line-break/>LEFT JOIN detalles_pedido dp<text:line-break/><text:tab/>ON p.id_pedido = dp.id_pedido<text:line-break/>GROUP BY<text:line-break/><text:tab/>c.id_cliente,<text:line-break/><text:tab/>c.nombre,<text:line-break/><text:tab/>c.ciudad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9T22:44:03.915416900</meta:creation-date>
    <dc:date>2026-05-29T22:54:48.030058300</dc:date>
    <meta:editing-duration>PT30S</meta:editing-duration>
    <meta:editing-cycles>1</meta:editing-cycles>
    <meta:document-statistic meta:table-count="0" meta:image-count="0" meta:object-count="0" meta:page-count="2" meta:paragraph-count="29" meta:word-count="170" meta:character-count="1265" meta:non-whitespace-character-count="1083"/>
    <meta:generator>LibreOffice/26.2.3.2$Windows_X86_64 LibreOffice_project/70e089b17412e4cb7773e41413306b17a2328c34</meta:generator>
  </office:meta>
</office:document-meta>
</file>